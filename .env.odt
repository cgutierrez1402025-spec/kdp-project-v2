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B_CONNECTION=mysql</text:p>
      <text:p text:style-name="Standard">DB_HOST=127.0.0.1</text:p>
      <text:p text:style-name="Standard">DB_PORT=3306</text:p>
      <text:p text:style-name="Standard">DB_DATABASE=kdp_project</text:p>
      <text:p text:style-name="Standard">DB_USERNAME=kdp_user</text:p>
      <text:p text:style-name="Standard">DB_PASSWORD=tu_password_segu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scar Mauricio Gener Pelaez</meta:initial-creator>
    <meta:creation-date>2026-05-25T20:43:11</meta:creation-date>
    <meta:document-statistic meta:table-count="0" meta:image-count="0" meta:object-count="0" meta:page-count="1" meta:paragraph-count="6" meta:word-count="6" meta:character-count="121"/>
    <dc:date>2026-05-25T20:43:38</dc:date>
    <dc:creator>Oscar Mauricio Gener Pelaez</dc:creator>
    <meta:editing-duration>PT27S</meta:editing-duration>
    <meta:editing-cycles>1</meta:editing-cycles>
    <meta:generator>OpenOffice/4.1.11$Unix OpenOffice.org_project/4111m1$Build-9808</meta:generator>
  </office:meta>
</office:document-meta>
</file>