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Copia este contenido a un archivo .gitignore en la raíz del proyecto</text:p>
      <text:p text:style-name="Standard">node_modules/</text:p>
      <text:p text:style-name="Standard">vendor/</text:p>
      <text:p text:style-name="Standard">.env</text:p>
      <text:p text:style-name="Standard">.env.local</text:p>
      <text:p text:style-name="Standard">storage/logs/*</text:p>
      <text:p text:style-name="Standard">bootstrap/cache/*</text:p>
      <text:p text:style-name="Standard">.DS_Store</text:p>
      <text:p text:style-name="Standard">*.sw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scar Mauricio Gener Pelaez</meta:initial-creator>
    <meta:creation-date>2026-05-26T21:11:45</meta:creation-date>
    <meta:document-statistic meta:table-count="0" meta:image-count="0" meta:object-count="0" meta:page-count="1" meta:paragraph-count="9" meta:word-count="21" meta:character-count="149"/>
    <dc:date>2026-05-26T21:12:20</dc:date>
    <dc:creator>Oscar Mauricio Gener Pelaez</dc:creator>
    <meta:editing-duration>PT36S</meta:editing-duration>
    <meta:editing-cycles>1</meta:editing-cycles>
    <meta:generator>OpenOffice/4.1.11$Unix OpenOffice.org_project/4111m1$Build-9808</meta:generator>
  </office:meta>
</office:document-meta>
</file>